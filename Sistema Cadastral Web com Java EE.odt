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Cadastral Web com Java EE</text:h>
      <text:p text:style-name="P1"><text:bookmark text:name="user-content-sistema-cadastral-web-com-java-ee"/>Projeto desenvolvido para a disciplina <text:span text:style-name="Strong_20_Emphasis">DGT2811 - Desenvolvimento Back-End Corporativo com Java e Cloud</text:span>.</text:p>
      <text:h text:style-name="Heading_20_2" text:outline-level="2">Descrição</text:h>
      <text:p text:style-name="P1"><text:bookmark text:name="user-content-descrição"/>Aplicação Web para cadastro de produtos utilizando <text:span text:style-name="Strong_20_Emphasis">Java EE (Jakarta EE)</text:span>, <text:span text:style-name="Strong_20_Emphasis">JPA</text:span>, <text:span text:style-name="Strong_20_Emphasis">EJB</text:span>, <text:span text:style-name="Strong_20_Emphasis">Servlets</text:span>, <text:span text:style-name="Strong_20_Emphasis">JSP</text:span>, <text:span text:style-name="Strong_20_Emphasis">SQL Server</text:span> e <text:span text:style-name="Strong_20_Emphasis">Bootstrap</text:span>. O sistema implementa operações CRUD (Cadastrar, Listar, Alterar e Excluir), aplicando conceitos de persistência de dados, regras de negócio e desenvolvimento Web corporativo.</text:p>
      <text:h text:style-name="Heading_20_2" text:outline-level="2">Objetivos</text:h>
      <text:list text:style-name="L1">
        <text:list-item>
          <text:p text:style-name="P4"><text:bookmark text:name="user-content-objetivos"/>Implementar persistência de dados com JPA. </text:p>
        </text:list-item>
        <text:list-item>
          <text:p text:style-name="P3">Aplicar regras de negócio utilizando EJB. </text:p>
        </text:list-item>
        <text:list-item>
          <text:p text:style-name="P3">Desenvolver interfaces Web com Servlets e JSP. </text:p>
        </text:list-item>
        <text:list-item>
          <text:p text:style-name="P3">Melhorar o design com Bootstrap. </text:p>
        </text:list-item>
        <text:list-item>
          <text:p text:style-name="P2">Integrar aplicação Java Web ao SQL Server. </text:p>
        </text:list-item>
      </text:list>
      <text:h text:style-name="Heading_20_2" text:outline-level="2">Tecnologias Utilizadas</text:h>
      <text:list text:style-name="L2">
        <text:list-item>
          <text:p text:style-name="P7"><text:bookmark text:name="user-content-tecnologias-utilizadas"/>Java (JDK) </text:p>
        </text:list-item>
        <text:list-item>
          <text:p text:style-name="P6">NetBeans IDE </text:p>
        </text:list-item>
        <text:list-item>
          <text:p text:style-name="P6">Jakarta EE 8 </text:p>
        </text:list-item>
        <text:list-item>
          <text:p text:style-name="P6">GlassFish Server </text:p>
        </text:list-item>
        <text:list-item>
          <text:p text:style-name="P6">SQL Server </text:p>
        </text:list-item>
        <text:list-item>
          <text:p text:style-name="P6">JPA </text:p>
        </text:list-item>
        <text:list-item>
          <text:p text:style-name="P6">EJB </text:p>
        </text:list-item>
        <text:list-item>
          <text:p text:style-name="P6">Servlets e JSP </text:p>
        </text:list-item>
        <text:list-item>
          <text:p text:style-name="P5">Bootstrap 5 </text:p>
        </text:list-item>
      </text:list>
      <text:h text:style-name="Heading_20_2" text:outline-level="2">Funcionalidades</text:h>
      <text:list text:style-name="L3">
        <text:list-item>
          <text:p text:style-name="P10"><text:bookmark text:name="user-content-funcionalidades"/>Cadastro de produtos </text:p>
        </text:list-item>
        <text:list-item>
          <text:p text:style-name="P9">Listagem de produtos </text:p>
        </text:list-item>
        <text:list-item>
          <text:p text:style-name="P9">Alteração de produtos </text:p>
        </text:list-item>
        <text:list-item>
          <text:p text:style-name="P9">Exclusão de produtos </text:p>
        </text:list-item>
        <text:list-item>
          <text:p text:style-name="P8">Interface responsiva com Bootstrap </text:p>
        </text:list-item>
      </text:list>
      <text:h text:style-name="Heading_20_2" text:outline-level="2">Autor</text:h>
      <text:p text:style-name="P1"><text:bookmark text:name="user-content-autor"/>Projeto acadêmico desenvolvido para fins educacionais na disciplina DGT2811 – Desenvolvimento Back-End Corporativo com Java e Clou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23:23:29.906929135</meta:creation-date>
    <dc:date>2026-06-14T23:24:43.812240480</dc:date>
    <meta:editing-duration>PT1M15S</meta:editing-duration>
    <meta:editing-cycles>1</meta:editing-cycles>
    <meta:document-statistic meta:table-count="0" meta:image-count="0" meta:object-count="0" meta:page-count="1" meta:paragraph-count="28" meta:word-count="168" meta:character-count="1071" meta:non-whitespace-character-count="930"/>
    <meta:generator>LibreOffice/24.2.7.2$Linux_X86_64 LibreOffice_project/420$Build-2</meta:generator>
  </office:meta>
</office:document-meta>
</file>